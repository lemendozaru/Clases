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Nerd Font" svg:font-family="'Ubuntu Nerd Font'" style:font-pitch="variable"/>
  </office:font-face-decls>
  <office:automatic-styles>
    <style:style style:name="co1" style:family="table-column">
      <style:table-column-properties fo:break-before="auto" style:column-width="5.6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43cm"/>
    </style:style>
    <style:style style:name="co4" style:family="table-column">
      <style:table-column-properties fo:break-before="auto" style:column-width="2.076cm"/>
    </style:style>
    <style:style style:name="co5" style:family="table-column">
      <style:table-column-properties fo:break-before="auto" style:column-width="1.1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Ubuntu Nerd Font"/>
    </style:style>
    <style:style style:name="ce2" style:family="table-cell" style:parent-style-name="Default">
      <style:table-cell-properties fo:background-color="#cccccc"/>
      <style:text-properties style:font-name="Ubuntu Nerd Font"/>
    </style:style>
    <style:style style:name="ce3" style:family="table-cell" style:parent-style-name="Default">
      <style:table-cell-properties fo:background-color="#b2b2b2"/>
      <style:text-properties style:font-name="Ubuntu Nerd Fon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4"/>
    <style:style style:name="ce6" style:family="table-cell" style:parent-style-name="Default" style:data-style-name="N104">
      <style:table-cell-properties fo:background-color="#cccccc"/>
    </style:style>
    <style:style style:name="ce7" style:family="table-cell" style:parent-style-name="Default" style:data-style-name="N104">
      <style:table-cell-properties fo:background-color="#b2b2b2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 table:null-year="1950"/>
      <table:table table:name="Hoja1" table:style-name="ta1">
        <table:table-column table:style-name="co1" table:default-cell-style-name="ce1"/>
        <table:table-column table:style-name="co2" table:number-columns-repeated="11" table:default-cell-style-name="ce5"/>
        <table:table-row table:style-name="ro1">
          <table:table-cell table:style-name="Default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ngreso</text:p>
          </table:table-cell>
          <table:table-cell/>
          <table:table-cell table:formula="of:=[Hoja2.$B$2]*[$Hoja2.D3]" office:value-type="currency" office:currency="MXN" office:value="100000" calcext:value-type="currency">
            <text:p>$100,000.00</text:p>
          </table:table-cell>
          <table:table-cell table:formula="of:=[Hoja2.$B$2]*[$Hoja2.E3]" office:value-type="currency" office:currency="MXN" office:value="120000" calcext:value-type="currency">
            <text:p>$120,000.00</text:p>
          </table:table-cell>
          <table:table-cell table:formula="of:=[Hoja2.$B$2]*[$Hoja2.F3]" office:value-type="currency" office:currency="MXN" office:value="126000" calcext:value-type="currency">
            <text:p>$126,000.00</text:p>
          </table:table-cell>
          <table:table-cell table:formula="of:=[Hoja2.$B$3]*[$Hoja2.G3]" office:value-type="currency" office:currency="MXN" office:value="141372" calcext:value-type="currency">
            <text:p>$141,372.00</text:p>
          </table:table-cell>
          <table:table-cell table:formula="of:=[Hoja2.$B$3]*[$Hoja2.H3]" office:value-type="currency" office:currency="MXN" office:value="144199.44" calcext:value-type="currency">
            <text:p>$144,199.44</text:p>
          </table:table-cell>
          <table:table-cell table:formula="of:=[Hoja2.$B$3]*[$Hoja2.I3]" office:value-type="currency" office:currency="MXN" office:value="147083.4288" calcext:value-type="currency">
            <text:p>$147,083.43</text:p>
          </table:table-cell>
          <table:table-cell table:formula="of:=[Hoja2.$B$3]*[$Hoja2.J3]" office:value-type="currency" office:currency="MXN" office:value="150025.097376" calcext:value-type="currency">
            <text:p>$150,025.10</text:p>
          </table:table-cell>
          <table:table-cell table:formula="of:=[Hoja2.$B$3]*[$Hoja2.K3]" office:value-type="currency" office:currency="MXN" office:value="153025.59932352" calcext:value-type="currency">
            <text:p>$153,025.60</text:p>
          </table:table-cell>
          <table:table-cell table:formula="of:=[Hoja2.$B$3]*[$Hoja2.L3]" office:value-type="currency" office:currency="MXN" office:value="156086.11130999" calcext:value-type="currency">
            <text:p>$156,086.11</text:p>
          </table:table-cell>
          <table:table-cell table:formula="of:=[Hoja2.$B$3]*[$Hoja2.M3]" office:value-type="currency" office:currency="MXN" office:value="159207.83353619" calcext:value-type="currency">
            <text:p>$159,207.83</text:p>
          </table:table-cell>
        </table:table-row>
        <table:table-row table:style-name="ro1">
          <table:table-cell office:value-type="string" calcext:value-type="string">
            <text:p>Venta de activos</text:p>
          </table:table-cell>
          <table:table-cell table:number-columns-repeated="6"/>
          <table:table-cell table:formula="of:=50000" office:value-type="currency" office:currency="MXN" office:value="50000" calcext:value-type="currency">
            <text:p>$50,0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stos variables</text:p>
          </table:table-cell>
          <table:table-cell/>
          <table:table-cell table:formula="of:=[Hoja2.$B$5]*[$Hoja2.D3]" office:value-type="currency" office:currency="MXN" office:value="-30000" calcext:value-type="currency">
            <text:p>-$30,000.00</text:p>
          </table:table-cell>
          <table:table-cell table:formula="of:=[Hoja2.$B$5]*[$Hoja2.E3]" office:value-type="currency" office:currency="MXN" office:value="-36000" calcext:value-type="currency">
            <text:p>-$36,000.00</text:p>
          </table:table-cell>
          <table:table-cell table:formula="of:=[Hoja2.$B$5]*[$Hoja2.F3]" office:value-type="currency" office:currency="MXN" office:value="-37800" calcext:value-type="currency">
            <text:p>-$37,800.00</text:p>
          </table:table-cell>
          <table:table-cell table:formula="of:=[Hoja2.$B$5]*[$Hoja2.G3]" office:value-type="currency" office:currency="MXN" office:value="-38556" calcext:value-type="currency">
            <text:p>-$38,556.00</text:p>
          </table:table-cell>
          <table:table-cell table:formula="of:=[Hoja2.$B$5]*[$Hoja2.H3]" office:value-type="currency" office:currency="MXN" office:value="-39327.12" calcext:value-type="currency">
            <text:p>-$39,327.12</text:p>
          </table:table-cell>
          <table:table-cell table:formula="of:=[Hoja2.$B$5]*[$Hoja2.I3]" office:value-type="currency" office:currency="MXN" office:value="-40113.6624" calcext:value-type="currency">
            <text:p>-$40,113.66</text:p>
          </table:table-cell>
          <table:table-cell table:formula="of:=[Hoja2.$B$5]*[$Hoja2.J3]" office:value-type="currency" office:currency="MXN" office:value="-40915.935648" calcext:value-type="currency">
            <text:p>-$40,915.94</text:p>
          </table:table-cell>
          <table:table-cell table:formula="of:=[Hoja2.$B$5]*[$Hoja2.K3]" office:value-type="currency" office:currency="MXN" office:value="-41734.25436096" calcext:value-type="currency">
            <text:p>-$41,734.25</text:p>
          </table:table-cell>
          <table:table-cell table:formula="of:=[Hoja2.$B$5]*[$Hoja2.L3]" office:value-type="currency" office:currency="MXN" office:value="-42568.9394481792" calcext:value-type="currency">
            <text:p>-$42,568.94</text:p>
          </table:table-cell>
          <table:table-cell table:formula="of:=[Hoja2.$B$5]*[$Hoja2.M3]" office:value-type="currency" office:currency="MXN" office:value="-43420.3182371428" calcext:value-type="currency">
            <text:p>-$43,420.32</text:p>
          </table:table-cell>
        </table:table-row>
        <table:table-row table:style-name="ro1">
          <table:table-cell office:value-type="string" calcext:value-type="string">
            <text:p>Costos fijos</text:p>
          </table:table-cell>
          <table:table-cell/>
          <table:table-cell table:number-columns-repeated="10" office:value-type="currency" office:currency="MXN" office:value="-20000" calcext:value-type="currency">
            <text:p>-$20,000.00</text:p>
          </table:table-cell>
        </table:table-row>
        <table:table-row table:style-name="ro1">
          <table:table-cell office:value-type="string" calcext:value-type="string">
            <text:p>Depreciación de la construcción </text:p>
          </table:table-cell>
          <table:table-cell/>
          <table:table-cell table:formula="of:=[.B16]/40" office:value-type="currency" office:currency="MXN" office:value="-5000" calcext:value-type="currency">
            <text:p>-$5,000.00</text:p>
          </table:table-cell>
          <table:table-cell table:formula="of:=[.C6]" office:value-type="currency" office:currency="MXN" office:value="-5000" calcext:value-type="currency">
            <text:p>-$5,000.00</text:p>
          </table:table-cell>
          <table:table-cell table:formula="of:=[.D6]" office:value-type="currency" office:currency="MXN" office:value="-5000" calcext:value-type="currency">
            <text:p>-$5,000.00</text:p>
          </table:table-cell>
          <table:table-cell table:formula="of:=[.E6]" office:value-type="currency" office:currency="MXN" office:value="-5000" calcext:value-type="currency">
            <text:p>-$5,000.00</text:p>
          </table:table-cell>
          <table:table-cell table:formula="of:=[.F6]" office:value-type="currency" office:currency="MXN" office:value="-5000" calcext:value-type="currency">
            <text:p>-$5,000.00</text:p>
          </table:table-cell>
          <table:table-cell table:formula="of:=[.G6]" office:value-type="currency" office:currency="MXN" office:value="-5000" calcext:value-type="currency">
            <text:p>-$5,000.00</text:p>
          </table:table-cell>
          <table:table-cell table:formula="of:=[.H6]" office:value-type="currency" office:currency="MXN" office:value="-5000" calcext:value-type="currency">
            <text:p>-$5,000.00</text:p>
          </table:table-cell>
          <table:table-cell table:formula="of:=[.I6]" office:value-type="currency" office:currency="MXN" office:value="-5000" calcext:value-type="currency">
            <text:p>-$5,000.00</text:p>
          </table:table-cell>
          <table:table-cell table:formula="of:=[.J6]" office:value-type="currency" office:currency="MXN" office:value="-5000" calcext:value-type="currency">
            <text:p>-$5,000.00</text:p>
          </table:table-cell>
          <table:table-cell table:formula="of:=[.K6]" office:value-type="currency" office:currency="MXN" office:value="-5000" calcext:value-type="currency">
            <text:p>-$5,000.00</text:p>
          </table:table-cell>
        </table:table-row>
        <table:table-row table:style-name="ro1">
          <table:table-cell office:value-type="string" calcext:value-type="string">
            <text:p>Depreciación de la maquinaria </text:p>
          </table:table-cell>
          <table:table-cell/>
          <table:table-cell table:formula="of:=[.B17]/10" office:value-type="currency" office:currency="MXN" office:value="-10000" calcext:value-type="currency">
            <text:p>-$10,000.00</text:p>
          </table:table-cell>
          <table:table-cell table:formula="of:=[.C7]" office:value-type="currency" office:currency="MXN" office:value="-10000" calcext:value-type="currency">
            <text:p>-$10,000.00</text:p>
          </table:table-cell>
          <table:table-cell table:formula="of:=[.D7]" office:value-type="currency" office:currency="MXN" office:value="-10000" calcext:value-type="currency">
            <text:p>-$10,000.00</text:p>
          </table:table-cell>
          <table:table-cell table:formula="of:=[.E7]" office:value-type="currency" office:currency="MXN" office:value="-10000" calcext:value-type="currency">
            <text:p>-$10,000.00</text:p>
          </table:table-cell>
          <table:table-cell table:formula="of:=[.F7]" office:value-type="currency" office:currency="MXN" office:value="-10000" calcext:value-type="currency">
            <text:p>-$10,000.00</text:p>
          </table:table-cell>
          <table:table-cell table:formula="of:=[.G7]" office:value-type="currency" office:currency="MXN" office:value="-10000" calcext:value-type="currency">
            <text:p>-$10,000.00</text:p>
          </table:table-cell>
          <table:table-cell table:formula="of:=[.H7]" office:value-type="currency" office:currency="MXN" office:value="-10000" calcext:value-type="currency">
            <text:p>-$10,000.00</text:p>
          </table:table-cell>
          <table:table-cell table:formula="of:=[.I7]" office:value-type="currency" office:currency="MXN" office:value="-10000" calcext:value-type="currency">
            <text:p>-$10,000.00</text:p>
          </table:table-cell>
          <table:table-cell table:formula="of:=[.J7]" office:value-type="currency" office:currency="MXN" office:value="-10000" calcext:value-type="currency">
            <text:p>-$10,000.00</text:p>
          </table:table-cell>
          <table:table-cell table:formula="of:=[.K7]" office:value-type="currency" office:currency="MXN" office:value="-10000" calcext:value-type="currency">
            <text:p>-$10,000.00</text:p>
          </table:table-cell>
        </table:table-row>
        <table:table-row table:style-name="ro1">
          <table:table-cell office:value-type="string" calcext:value-type="string">
            <text:p>Valor libro </text:p>
          </table:table-cell>
          <table:table-cell table:number-columns-repeated="6"/>
          <table:table-cell table:formula="of:=[.B17]-SUM([.C7:.H7])" office:value-type="currency" office:currency="MXN" office:value="-40000" calcext:value-type="currency">
            <text:p>-$40,000.0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Utilidad </text:p>
          </table:table-cell>
          <table:table-cell table:style-name="ce6" table:formula="of:=SUM([.B2:.B8])" office:value-type="currency" office:currency="MXN" office:value="0" calcext:value-type="currency">
            <text:p>$0.00</text:p>
          </table:table-cell>
          <table:table-cell table:style-name="ce6" table:formula="of:=SUM([.C2:.C8])" office:value-type="currency" office:currency="MXN" office:value="35000" calcext:value-type="currency">
            <text:p>$35,000.00</text:p>
          </table:table-cell>
          <table:table-cell table:style-name="ce6" table:formula="of:=SUM([.D2:.D8])" office:value-type="currency" office:currency="MXN" office:value="49000" calcext:value-type="currency">
            <text:p>$49,000.00</text:p>
          </table:table-cell>
          <table:table-cell table:style-name="ce6" table:formula="of:=SUM([.E2:.E8])" office:value-type="currency" office:currency="MXN" office:value="53200" calcext:value-type="currency">
            <text:p>$53,200.00</text:p>
          </table:table-cell>
          <table:table-cell table:style-name="ce6" table:formula="of:=SUM([.F2:.F8])" office:value-type="currency" office:currency="MXN" office:value="67816" calcext:value-type="currency">
            <text:p>$67,816.00</text:p>
          </table:table-cell>
          <table:table-cell table:style-name="ce6" table:formula="of:=SUM([.G2:.G8])" office:value-type="currency" office:currency="MXN" office:value="69872.32" calcext:value-type="currency">
            <text:p>$69,872.32</text:p>
          </table:table-cell>
          <table:table-cell table:style-name="ce6" table:formula="of:=SUM([.H2:.H8])" office:value-type="currency" office:currency="MXN" office:value="81969.7664" calcext:value-type="currency">
            <text:p>$81,969.77</text:p>
          </table:table-cell>
          <table:table-cell table:style-name="ce6" table:formula="of:=SUM([.I2:.I8])" office:value-type="currency" office:currency="MXN" office:value="74109.161728" calcext:value-type="currency">
            <text:p>$74,109.16</text:p>
          </table:table-cell>
          <table:table-cell table:style-name="ce6" table:formula="of:=SUM([.J2:.J8])" office:value-type="currency" office:currency="MXN" office:value="76291.34496256" calcext:value-type="currency">
            <text:p>$76,291.34</text:p>
          </table:table-cell>
          <table:table-cell table:style-name="ce6" table:formula="of:=SUM([.K2:.K8])" office:value-type="currency" office:currency="MXN" office:value="78517.1718618112" calcext:value-type="currency">
            <text:p>$78,517.17</text:p>
          </table:table-cell>
          <table:table-cell table:style-name="ce6" table:formula="of:=SUM([.L2:.L8])" office:value-type="currency" office:currency="MXN" office:value="80787.5152990474" calcext:value-type="currency">
            <text:p>$80,787.52</text:p>
          </table:table-cell>
        </table:table-row>
        <table:table-row table:style-name="ro1">
          <table:table-cell office:value-type="string" calcext:value-type="string">
            <text:p>Impuesto </text:p>
          </table:table-cell>
          <table:table-cell table:formula="of:=[.B9]*0.17" office:value-type="currency" office:currency="MXN" office:value="0" calcext:value-type="currency">
            <text:p>$0.00</text:p>
          </table:table-cell>
          <table:table-cell table:formula="of:=-[.C9]*0.17" office:value-type="currency" office:currency="MXN" office:value="-5950" calcext:value-type="currency">
            <text:p>-$5,950.00</text:p>
          </table:table-cell>
          <table:table-cell table:formula="of:=-[.D9]*0.17" office:value-type="currency" office:currency="MXN" office:value="-8330" calcext:value-type="currency">
            <text:p>-$8,330.00</text:p>
          </table:table-cell>
          <table:table-cell table:formula="of:=-[.E9]*0.17" office:value-type="currency" office:currency="MXN" office:value="-9044" calcext:value-type="currency">
            <text:p>-$9,044.00</text:p>
          </table:table-cell>
          <table:table-cell table:formula="of:=-[.F9]*0.17" office:value-type="currency" office:currency="MXN" office:value="-11528.72" calcext:value-type="currency">
            <text:p>-$11,528.72</text:p>
          </table:table-cell>
          <table:table-cell table:formula="of:=-[.G9]*0.17" office:value-type="currency" office:currency="MXN" office:value="-11878.2944" calcext:value-type="currency">
            <text:p>-$11,878.29</text:p>
          </table:table-cell>
          <table:table-cell table:formula="of:=-[.H9]*0.17" office:value-type="currency" office:currency="MXN" office:value="-13934.860288" calcext:value-type="currency">
            <text:p>-$13,934.86</text:p>
          </table:table-cell>
          <table:table-cell table:formula="of:=-[.I9]*0.17" office:value-type="currency" office:currency="MXN" office:value="-12598.55749376" calcext:value-type="currency">
            <text:p>-$12,598.56</text:p>
          </table:table-cell>
          <table:table-cell table:formula="of:=-[.J9]*0.17" office:value-type="currency" office:currency="MXN" office:value="-12969.5286436352" calcext:value-type="currency">
            <text:p>-$12,969.53</text:p>
          </table:table-cell>
          <table:table-cell table:formula="of:=-[.K9]*0.17" office:value-type="currency" office:currency="MXN" office:value="-13347.9192165079" calcext:value-type="currency">
            <text:p>-$13,347.92</text:p>
          </table:table-cell>
          <table:table-cell table:formula="of:=-[.L9]*0.17" office:value-type="currency" office:currency="MXN" office:value="-13733.8776008381" calcext:value-type="currency">
            <text:p>-$13,733.88</text:p>
          </table:table-cell>
        </table:table-row>
        <table:table-row table:style-name="ro1">
          <table:table-cell table:style-name="ce2" office:value-type="string" calcext:value-type="string">
            <text:p>Utilidad neta </text:p>
          </table:table-cell>
          <table:table-cell table:style-name="ce6" table:formula="of:=[.B9]-([.B9]*0.17)" office:value-type="currency" office:currency="MXN" office:value="0" calcext:value-type="currency">
            <text:p>$0.00</text:p>
          </table:table-cell>
          <table:table-cell table:style-name="ce6" table:formula="of:=[.C9]+[.C10]" office:value-type="currency" office:currency="MXN" office:value="29050" calcext:value-type="currency">
            <text:p>$29,050.00</text:p>
          </table:table-cell>
          <table:table-cell table:style-name="ce6" table:formula="of:=[.D9]+[.D10]" office:value-type="currency" office:currency="MXN" office:value="40670" calcext:value-type="currency">
            <text:p>$40,670.00</text:p>
          </table:table-cell>
          <table:table-cell table:style-name="ce6" table:formula="of:=[.E9]+[.E10]" office:value-type="currency" office:currency="MXN" office:value="44156" calcext:value-type="currency">
            <text:p>$44,156.00</text:p>
          </table:table-cell>
          <table:table-cell table:style-name="ce6" table:formula="of:=[.F9]+[.F10]" office:value-type="currency" office:currency="MXN" office:value="56287.28" calcext:value-type="currency">
            <text:p>$56,287.28</text:p>
          </table:table-cell>
          <table:table-cell table:style-name="ce6" table:formula="of:=[.G9]+[.G10]" office:value-type="currency" office:currency="MXN" office:value="57994.0256" calcext:value-type="currency">
            <text:p>$57,994.03</text:p>
          </table:table-cell>
          <table:table-cell table:style-name="ce6" table:formula="of:=[.H9]+[.H10]" office:value-type="currency" office:currency="MXN" office:value="68034.906112" calcext:value-type="currency">
            <text:p>$68,034.91</text:p>
          </table:table-cell>
          <table:table-cell table:style-name="ce6" table:formula="of:=[.I9]+[.I10]" office:value-type="currency" office:currency="MXN" office:value="61510.60423424" calcext:value-type="currency">
            <text:p>$61,510.60</text:p>
          </table:table-cell>
          <table:table-cell table:style-name="ce6" table:formula="of:=[.J9]+[.J10]" office:value-type="currency" office:currency="MXN" office:value="63321.8163189248" calcext:value-type="currency">
            <text:p>$63,321.82</text:p>
          </table:table-cell>
          <table:table-cell table:style-name="ce6" table:formula="of:=[.K9]+[.K10]" office:value-type="currency" office:currency="MXN" office:value="65169.2526453033" calcext:value-type="currency">
            <text:p>$65,169.25</text:p>
          </table:table-cell>
          <table:table-cell table:style-name="ce6" table:formula="of:=[.L9]+[.L10]" office:value-type="currency" office:currency="MXN" office:value="67053.6376982094" calcext:value-type="currency">
            <text:p>$67,053.64</text:p>
          </table:table-cell>
        </table:table-row>
        <table:table-row table:style-name="ro1">
          <table:table-cell office:value-type="string" calcext:value-type="string">
            <text:p>Depreciación construcción </text:p>
          </table:table-cell>
          <table:table-cell/>
          <table:table-cell table:formula="of:=-[.C6]" office:value-type="currency" office:currency="MXN" office:value="5000" calcext:value-type="currency">
            <text:p>$5,000.00</text:p>
          </table:table-cell>
          <table:table-cell table:formula="of:=-[.D6]" office:value-type="currency" office:currency="MXN" office:value="5000" calcext:value-type="currency">
            <text:p>$5,000.00</text:p>
          </table:table-cell>
          <table:table-cell table:formula="of:=-[.E6]" office:value-type="currency" office:currency="MXN" office:value="5000" calcext:value-type="currency">
            <text:p>$5,000.00</text:p>
          </table:table-cell>
          <table:table-cell table:formula="of:=-[.F6]" office:value-type="currency" office:currency="MXN" office:value="5000" calcext:value-type="currency">
            <text:p>$5,000.00</text:p>
          </table:table-cell>
          <table:table-cell table:formula="of:=-[.G6]" office:value-type="currency" office:currency="MXN" office:value="5000" calcext:value-type="currency">
            <text:p>$5,000.00</text:p>
          </table:table-cell>
          <table:table-cell table:formula="of:=-[.H6]" office:value-type="currency" office:currency="MXN" office:value="5000" calcext:value-type="currency">
            <text:p>$5,000.00</text:p>
          </table:table-cell>
          <table:table-cell table:formula="of:=-[.I6]" office:value-type="currency" office:currency="MXN" office:value="5000" calcext:value-type="currency">
            <text:p>$5,000.00</text:p>
          </table:table-cell>
          <table:table-cell table:formula="of:=-[.J6]" office:value-type="currency" office:currency="MXN" office:value="5000" calcext:value-type="currency">
            <text:p>$5,000.00</text:p>
          </table:table-cell>
          <table:table-cell table:formula="of:=-[.K6]" office:value-type="currency" office:currency="MXN" office:value="5000" calcext:value-type="currency">
            <text:p>$5,000.00</text:p>
          </table:table-cell>
          <table:table-cell table:formula="of:=-[.L6]" office:value-type="currency" office:currency="MXN" office:value="5000" calcext:value-type="currency">
            <text:p>$5,000.00</text:p>
          </table:table-cell>
        </table:table-row>
        <table:table-row table:style-name="ro1">
          <table:table-cell office:value-type="string" calcext:value-type="string">
            <text:p>Depreciación maquinaria </text:p>
          </table:table-cell>
          <table:table-cell/>
          <table:table-cell table:formula="of:=-[.C7]" office:value-type="currency" office:currency="MXN" office:value="10000" calcext:value-type="currency">
            <text:p>$10,000.00</text:p>
          </table:table-cell>
          <table:table-cell table:formula="of:=-[.D7]" office:value-type="currency" office:currency="MXN" office:value="10000" calcext:value-type="currency">
            <text:p>$10,000.00</text:p>
          </table:table-cell>
          <table:table-cell table:formula="of:=-[.E7]" office:value-type="currency" office:currency="MXN" office:value="10000" calcext:value-type="currency">
            <text:p>$10,000.00</text:p>
          </table:table-cell>
          <table:table-cell table:formula="of:=-[.F7]" office:value-type="currency" office:currency="MXN" office:value="10000" calcext:value-type="currency">
            <text:p>$10,000.00</text:p>
          </table:table-cell>
          <table:table-cell table:formula="of:=-[.G7]" office:value-type="currency" office:currency="MXN" office:value="10000" calcext:value-type="currency">
            <text:p>$10,000.00</text:p>
          </table:table-cell>
          <table:table-cell table:formula="of:=-[.H7]" office:value-type="currency" office:currency="MXN" office:value="10000" calcext:value-type="currency">
            <text:p>$10,000.00</text:p>
          </table:table-cell>
          <table:table-cell table:formula="of:=-[.I7]" office:value-type="currency" office:currency="MXN" office:value="10000" calcext:value-type="currency">
            <text:p>$10,000.00</text:p>
          </table:table-cell>
          <table:table-cell table:formula="of:=-[.J7]" office:value-type="currency" office:currency="MXN" office:value="10000" calcext:value-type="currency">
            <text:p>$10,000.00</text:p>
          </table:table-cell>
          <table:table-cell table:formula="of:=-[.K7]" office:value-type="currency" office:currency="MXN" office:value="10000" calcext:value-type="currency">
            <text:p>$10,000.00</text:p>
          </table:table-cell>
          <table:table-cell table:formula="of:=-[.L7]" office:value-type="currency" office:currency="MXN" office:value="10000" calcext:value-type="currency">
            <text:p>$10,000.00</text:p>
          </table:table-cell>
        </table:table-row>
        <table:table-row table:style-name="ro1">
          <table:table-cell office:value-type="string" calcext:value-type="string">
            <text:p>Valor libro </text:p>
          </table:table-cell>
          <table:table-cell table:number-columns-repeated="6"/>
          <table:table-cell table:formula="of:=-[.H8]" office:value-type="currency" office:currency="MXN" office:value="40000" calcext:value-type="currency">
            <text:p>$40,0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reno </text:p>
          </table:table-cell>
          <table:table-cell office:value-type="currency" office:currency="MXN" office:value="-80000" calcext:value-type="currency">
            <text:p>-$80,00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strucción </text:p>
          </table:table-cell>
          <table:table-cell office:value-type="currency" office:currency="MXN" office:value="-200000" calcext:value-type="currency">
            <text:p>-$200,00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quinaria </text:p>
          </table:table-cell>
          <table:table-cell office:value-type="currency" office:currency="MXN" office:value="-100000" calcext:value-type="currency">
            <text:p>-$100,000.00</text:p>
          </table:table-cell>
          <table:table-cell table:number-columns-repeated="5"/>
          <table:table-cell table:formula="of:=[.B17]" office:value-type="currency" office:currency="MXN" office:value="-100000" calcext:value-type="currency">
            <text:p>-$100,0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ital de trabajo </text:p>
          </table:table-cell>
          <table:table-cell table:formula="of:=([.C4]+[.C5])/2" office:value-type="currency" office:currency="MXN" office:value="-25000" calcext:value-type="currency">
            <text:p>-$25,000.00</text:p>
          </table:table-cell>
          <table:table-cell table:formula="of:=(SUM([.D4];[.D5])/2)-[.B19]" office:value-type="currency" office:currency="MXN" office:value="-3000" calcext:value-type="currency">
            <text:p>-$3,000.00</text:p>
          </table:table-cell>
          <table:table-cell table:formula="of:=(SUM([.E4];[.E5])/2)-[.C19]" office:value-type="currency" office:currency="MXN" office:value="-900" calcext:value-type="currency">
            <text:p>-$900.00</text:p>
          </table:table-cell>
          <table:table-cell table:formula="of:=(SUM([.F4];[.F5])/2)-[.D19]" office:value-type="currency" office:currency="MXN" office:value="-378" calcext:value-type="currency">
            <text:p>-$378.00</text:p>
          </table:table-cell>
          <table:table-cell table:formula="of:=(SUM([.G4];[.G5])/2)-[.E19]" office:value-type="currency" office:currency="MXN" office:value="-385.560000000001" calcext:value-type="currency">
            <text:p>-$385.56</text:p>
          </table:table-cell>
          <table:table-cell table:formula="of:=(SUM([.H4];[.H5])/2)-[.F19]" office:value-type="currency" office:currency="MXN" office:value="-393.271199999999" calcext:value-type="currency">
            <text:p>-$393.27</text:p>
          </table:table-cell>
          <table:table-cell table:formula="of:=(SUM([.I4];[.I5])/2)-[.G19]" office:value-type="currency" office:currency="MXN" office:value="-401.136623999999" calcext:value-type="currency">
            <text:p>-$401.14</text:p>
          </table:table-cell>
          <table:table-cell table:formula="of:=(SUM([.J4];[.J5])/2)-[.H19]" office:value-type="currency" office:currency="MXN" office:value="-409.159356479999" calcext:value-type="currency">
            <text:p>-$409.16</text:p>
          </table:table-cell>
          <table:table-cell table:formula="of:=(SUM([.K4];[.K5])/2)-[.I19]" office:value-type="currency" office:currency="MXN" office:value="-417.342543609604" calcext:value-type="currency">
            <text:p>-$417.34</text:p>
          </table:table-cell>
          <table:table-cell table:formula="of:=(SUM([.L4];[.L5])/2)-[.J19]" office:value-type="currency" office:currency="MXN" office:value="-425.689394481789" calcext:value-type="currency">
            <text:p>-$425.69</text:p>
          </table:table-cell>
          <table:table-cell table:formula="of:=(SUM([.M4];[.M5])/2)-[.K19]" office:value-type="currency" office:currency="MXN" office:value="31710.1591185714" calcext:value-type="currency">
            <text:p>$31,710.16</text:p>
          </table:table-cell>
        </table:table-row>
        <table:table-row table:style-name="ro1">
          <table:table-cell table:style-name="Default" office:value-type="string" calcext:value-type="string">
            <text:p>Capital de trabajo (acumulado)</text:p>
          </table:table-cell>
          <table:table-cell table:formula="of:=[.B18]" office:value-type="currency" office:currency="MXN" office:value="-25000" calcext:value-type="currency">
            <text:p>-$25,000.00</text:p>
          </table:table-cell>
          <table:table-cell table:formula="of:=[.B19]+[.C18]" office:value-type="currency" office:currency="MXN" office:value="-28000" calcext:value-type="currency">
            <text:p>-$28,000.00</text:p>
          </table:table-cell>
          <table:table-cell table:formula="of:=[.C19]+[.D18]" office:value-type="currency" office:currency="MXN" office:value="-28900" calcext:value-type="currency">
            <text:p>-$28,900.00</text:p>
          </table:table-cell>
          <table:table-cell table:formula="of:=[.D19]+[.E18]" office:value-type="currency" office:currency="MXN" office:value="-29278" calcext:value-type="currency">
            <text:p>-$29,278.00</text:p>
          </table:table-cell>
          <table:table-cell table:formula="of:=[.E19]+[.F18]" office:value-type="currency" office:currency="MXN" office:value="-29663.56" calcext:value-type="currency">
            <text:p>-$29,663.56</text:p>
          </table:table-cell>
          <table:table-cell table:formula="of:=[.F19]+[.G18]" office:value-type="currency" office:currency="MXN" office:value="-30056.8312" calcext:value-type="currency">
            <text:p>-$30,056.83</text:p>
          </table:table-cell>
          <table:table-cell table:formula="of:=[.G19]+[.H18]" office:value-type="currency" office:currency="MXN" office:value="-30457.967824" calcext:value-type="currency">
            <text:p>-$30,457.97</text:p>
          </table:table-cell>
          <table:table-cell table:formula="of:=[.H19]+[.I18]" office:value-type="currency" office:currency="MXN" office:value="-30867.12718048" calcext:value-type="currency">
            <text:p>-$30,867.13</text:p>
          </table:table-cell>
          <table:table-cell table:formula="of:=[.I19]+[.J18]" office:value-type="currency" office:currency="MXN" office:value="-31284.4697240896" calcext:value-type="currency">
            <text:p>-$31,284.47</text:p>
          </table:table-cell>
          <table:table-cell table:formula="of:=[.J19]+[.K18]" office:value-type="currency" office:currency="MXN" office:value="-31710.1591185714" calcext:value-type="currency">
            <text:p>-$31,710.16</text:p>
          </table:table-cell>
          <table:table-cell table:formula="of:=[.K19]+[.L18]" office:value-type="currency" office:currency="MXN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Valor de desecho </text:p>
          </table:table-cell>
          <table:table-cell table:number-columns-repeated="10"/>
          <table:table-cell table:formula="of:=-[.B15]-([.B16]+SUM([.C12:.L12]))-([.B17]+SUM([.I13:.L13]))" office:value-type="currency" office:currency="MXN" office:value="290000" calcext:value-type="currency">
            <text:p>$290,000.00</text:p>
          </table:table-cell>
        </table:table-row>
        <table:table-row table:style-name="ro1">
          <table:table-cell table:style-name="ce3" office:value-type="string" calcext:value-type="string">
            <text:p>Flujo del proyecto </text:p>
          </table:table-cell>
          <table:table-cell table:style-name="ce7" table:formula="of:=SUM([.B11:.B18];[.B20])" office:value-type="currency" office:currency="MXN" office:value="-405000" calcext:value-type="currency">
            <text:p>-$405,000.00</text:p>
          </table:table-cell>
          <table:table-cell table:style-name="ce7" table:formula="of:=SUM([.C11:.C18];[.C20])" office:value-type="currency" office:currency="MXN" office:value="41050" calcext:value-type="currency">
            <text:p>$41,050.00</text:p>
          </table:table-cell>
          <table:table-cell table:style-name="ce7" table:formula="of:=SUM([.D11:.D18];[.D20])" office:value-type="currency" office:currency="MXN" office:value="54770" calcext:value-type="currency">
            <text:p>$54,770.00</text:p>
          </table:table-cell>
          <table:table-cell table:style-name="ce7" table:formula="of:=SUM([.E11:.E18];[.E20])" office:value-type="currency" office:currency="MXN" office:value="58778" calcext:value-type="currency">
            <text:p>$58,778.00</text:p>
          </table:table-cell>
          <table:table-cell table:style-name="ce7" table:formula="of:=SUM([.F11:.F18];[.F20])" office:value-type="currency" office:currency="MXN" office:value="70901.72" calcext:value-type="currency">
            <text:p>$70,901.72</text:p>
          </table:table-cell>
          <table:table-cell table:style-name="ce7" table:formula="of:=SUM([.G11:.G18];[.G20])" office:value-type="currency" office:currency="MXN" office:value="72600.7544" calcext:value-type="currency">
            <text:p>$72,600.75</text:p>
          </table:table-cell>
          <table:table-cell table:style-name="ce7" table:formula="of:=SUM([.H11:.H18];[.H20])" office:value-type="currency" office:currency="MXN" office:value="22633.769488" calcext:value-type="currency">
            <text:p>$22,633.77</text:p>
          </table:table-cell>
          <table:table-cell table:style-name="ce7" table:formula="of:=SUM([.I11:.I18];[.I20])" office:value-type="currency" office:currency="MXN" office:value="76101.44487776" calcext:value-type="currency">
            <text:p>$76,101.44</text:p>
          </table:table-cell>
          <table:table-cell table:style-name="ce7" table:formula="of:=SUM([.J11:.J18];[.J20])" office:value-type="currency" office:currency="MXN" office:value="77904.4737753152" calcext:value-type="currency">
            <text:p>$77,904.47</text:p>
          </table:table-cell>
          <table:table-cell table:style-name="ce7" table:formula="of:=SUM([.K11:.K18];[.K20])" office:value-type="currency" office:currency="MXN" office:value="79743.5632508215" calcext:value-type="currency">
            <text:p>$79,743.56</text:p>
          </table:table-cell>
          <table:table-cell table:style-name="ce7" table:formula="of:=SUM([.L11:.L18];[.L20])" office:value-type="currency" office:currency="MXN" office:value="403763.796816781" calcext:value-type="currency">
            <text:p>$403,763.80</text:p>
          </table:table-cell>
        </table:table-row>
      </table:table>
      <table:table table:name="Hoja2" table:style-name="ta1"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5" table:default-cell-style-name="ce9"/>
        <table:table-column table:style-name="co5" table:number-columns-repeated="8" table:default-cell-style-name="Default"/>
        <table:table-row table:style-name="ro1">
          <table:table-cell table:number-columns-repeated="3"/>
          <table:table-cell table:style-name="ce8" office:value-type="string" calcext:value-type="string" table:number-columns-spanned="10" table:number-rows-spanned="1">
            <text:p>Unidades proyectadas</text:p>
          </table:table-cell>
          <table:covered-table-cell table:style-name="Default"/>
          <table:covered-table-cell table:number-columns-repeated="8"/>
        </table:table-row>
        <table:table-row table:style-name="ro1">
          <table:table-cell office:value-type="string" calcext:value-type="string">
            <text:p>Precio de introducción:</text:p>
          </table:table-cell>
          <table:table-cell table:style-name="ce5" office:value-type="currency" office:currency="MXN" office:value="100" calcext:value-type="currency">
            <text:p>$100.00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ecio normal (cuarto año):</text:p>
          </table:table-cell>
          <table:table-cell table:style-name="ce5" office:value-type="currency" office:currency="MXN" office:value="110" calcext:value-type="currency">
            <text:p>$110.00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Default" table:formula="of:=[.D3]+([.D3]*0.2)" office:value-type="float" office:value="1200" calcext:value-type="float">
            <text:p>1200</text:p>
          </table:table-cell>
          <table:table-cell table:formula="of:=[.E3]+[.E3]*0.05" office:value-type="float" office:value="1260" calcext:value-type="float">
            <text:p>1260</text:p>
          </table:table-cell>
          <table:table-cell table:style-name="ce9" table:formula="of:=[.F3]+[.F3]*0.02" office:value-type="float" office:value="1285.2" calcext:value-type="float">
            <text:p>1285</text:p>
          </table:table-cell>
          <table:table-cell table:style-name="ce9" table:formula="of:=[.G3]+[.G3]*0.02" office:value-type="float" office:value="1310.904" calcext:value-type="float">
            <text:p>1311</text:p>
          </table:table-cell>
          <table:table-cell table:style-name="ce9" table:formula="of:=[.H3]+[.H3]*0.02" office:value-type="float" office:value="1337.12208" calcext:value-type="float">
            <text:p>1337</text:p>
          </table:table-cell>
          <table:table-cell table:style-name="ce9" table:formula="of:=[.I3]+[.I3]*0.02" office:value-type="float" office:value="1363.8645216" calcext:value-type="float">
            <text:p>1364</text:p>
          </table:table-cell>
          <table:table-cell table:style-name="ce9" table:formula="of:=[.J3]+[.J3]*0.02" office:value-type="float" office:value="1391.141812032" calcext:value-type="float">
            <text:p>1391</text:p>
          </table:table-cell>
          <table:table-cell table:style-name="ce9" table:formula="of:=[.K3]+[.K3]*0.02" office:value-type="float" office:value="1418.96464827264" calcext:value-type="float">
            <text:p>1419</text:p>
          </table:table-cell>
          <table:table-cell table:style-name="ce9" table:formula="of:=[.L3]+[.L3]*0.02" office:value-type="float" office:value="1447.34394123809" calcext:value-type="float">
            <text:p>1447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Costos variables:</text:p>
          </table:table-cell>
          <table:table-cell table:style-name="ce5" office:value-type="currency" office:currency="MXN" office:value="-30" calcext:value-type="currency">
            <text:p>-$3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stos fijos anuales:</text:p>
          </table:table-cell>
          <table:table-cell table:style-name="ce5" office:value-type="currency" office:currency="MXN" office:value="-20000" calcext:value-type="currency">
            <text:p>-$20,000.00</text:p>
          </table:table-cell>
          <table:table-cell table:number-columns-repeated="11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Nerd Font" svg:font-family="'Ubuntu Nerd Font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2T14:25:30.850044133</meta:creation-date>
    <dc:date>2026-05-22T19:02:30.603207977</dc:date>
    <meta:editing-duration>PT3H5M39S</meta:editing-duration>
    <meta:editing-cycles>5</meta:editing-cycles>
    <meta:generator>LibreOffice/26.2.3.2$Linux_X86_64 LibreOffice_project/620$Build-2</meta:generator>
    <meta:document-statistic meta:table-count="2" meta:cell-count="204" meta:object-count="0"/>
  </office:meta>
</office:document-meta>
</file>